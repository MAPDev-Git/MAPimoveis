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fo:font-weight="bold" officeooo:rsid="001cecef" officeooo:paragraph-rsid="001cecef" style:font-weight-asian="bold" style:font-weight-complex="bold"/>
    </style:style>
    <style:style style:name="P2" style:family="paragraph" style:parent-style-name="Standard">
      <style:text-properties fo:font-weight="bold" officeooo:rsid="001572a8" officeooo:paragraph-rsid="001572a8" style:font-weight-asian="bold" style:font-weight-complex="bold"/>
    </style:style>
    <style:style style:name="P3" style:family="paragraph" style:parent-style-name="Standard">
      <style:text-properties officeooo:rsid="001572a8" officeooo:paragraph-rsid="001572a8"/>
    </style:style>
    <style:style style:name="P4" style:family="paragraph" style:parent-style-name="Standard">
      <style:text-properties officeooo:rsid="00165551" officeooo:paragraph-rsid="00165551"/>
    </style:style>
    <style:style style:name="P5" style:family="paragraph" style:parent-style-name="Standard">
      <style:text-properties officeooo:rsid="00159493" officeooo:paragraph-rsid="00159493"/>
    </style:style>
    <style:style style:name="P6" style:family="paragraph" style:parent-style-name="Standard">
      <style:text-properties officeooo:rsid="0015b35a" officeooo:paragraph-rsid="0015b35a"/>
    </style:style>
    <style:style style:name="P7" style:family="paragraph" style:parent-style-name="Standard">
      <style:text-properties officeooo:paragraph-rsid="0015b35a"/>
    </style:style>
    <style:style style:name="P8" style:family="paragraph" style:parent-style-name="Standard">
      <style:text-properties fo:font-weight="bold" officeooo:rsid="00159493" officeooo:paragraph-rsid="00159493" style:font-weight-asian="bold" style:font-weight-complex="bold"/>
    </style:style>
    <style:style style:name="P9" style:family="paragraph" style:parent-style-name="Standard">
      <style:text-properties fo:font-weight="bold" officeooo:rsid="001a751e" officeooo:paragraph-rsid="001a751e" style:font-weight-asian="bold" style:font-weight-complex="bold"/>
    </style:style>
    <style:style style:name="P10" style:family="paragraph" style:parent-style-name="Heading_20_2">
      <style:text-properties fo:font-variant="normal" fo:text-transform="none" fo:color="#000000" loext:opacity="100%" style:font-name="inherit" fo:font-size="9pt" fo:letter-spacing="normal" fo:font-style="normal" fo:font-weight="bold" officeooo:rsid="00159493" officeooo:paragraph-rsid="00159493" style:font-weight-asian="bold" style:font-weight-complex="bold" loext:padding="0cm" loext:border="none"/>
    </style:style>
    <style:style style:name="P11" style:family="paragraph" style:parent-style-name="Text_20_body">
      <style:paragraph-properties fo:margin-left="0cm" fo:margin-right="0cm" fo:margin-top="0.106cm" fo:margin-bottom="0.247cm" style:contextual-spacing="false" fo:line-height="133%" fo:orphans="2" fo:widows="2" fo:text-indent="0cm" style:auto-text-indent="false"/>
      <style:text-properties fo:font-variant="normal" fo:text-transform="none" fo:color="#000000" loext:opacity="100%" style:font-name="inherit" fo:font-size="9pt" fo:letter-spacing="normal" fo:font-style="normal" fo:font-weight="normal" officeooo:rsid="00159493" style:font-weight-asian="bold" style:font-weight-complex="bold" loext:padding="0cm" loext:border="none"/>
    </style:style>
    <style:style style:name="T1" style:family="text">
      <style:text-properties officeooo:rsid="001a751e"/>
    </style:style>
    <style:style style:name="T2" style:family="text">
      <style:text-properties officeooo:rsid="001d23f4"/>
    </style:style>
    <style:style style:name="T3" style:family="text">
      <style:text-properties officeooo:rsid="0015b35a"/>
    </style:style>
    <style:style style:name="T4" style:family="text">
      <style:text-properties officeooo:rsid="001bf22b"/>
    </style:style>
    <style:style style:name="T5" style:family="text">
      <style:text-properties officeooo:rsid="001812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oridade: 3</text:p>
      <text:p text:style-name="P2"/>
      <text:p text:style-name="P2">Apartamento <text:span text:style-name="T1">201</text:span></text:p>
      <text:p text:style-name="P3">Residencial <text:span text:style-name="T1">Catharina</text:span></text:p>
      <text:p text:style-name="P4">Endereço: <text:span text:style-name="T1">Avenida João Machado Soares, 1287, </text:span><text:span text:style-name="T2">Camobi – Santa Maria (RS)</text:span></text:p>
      <text:p text:style-name="P5"><text:span text:style-name="T1">86</text:span>,<text:span text:style-name="T1">6</text:span><text:span text:style-name="T3">2</text:span> m² Área Privativa</text:p>
      <text:p text:style-name="P5">1<text:span text:style-name="T1">10</text:span>,<text:span text:style-name="T1">33</text:span>, m² Área total</text:p>
      <text:p text:style-name="P5"><text:span text:style-name="T1">3</text:span> Dormitórios (1 Suíte)</text:p>
      <text:p text:style-name="P5">2 Banheiros (1 Social e 1 na Suíte)</text:p>
      <text:p text:style-name="P5">Cozinha integrada ao Living <text:span text:style-name="T1">estilo Americano</text:span> (Sala estar e jantar)</text:p>
      <text:p text:style-name="P5">Sacada com Churrasqueira</text:p>
      <text:p text:style-name="P5">Vaga de Garagem (Fechada)</text:p>
      <text:p text:style-name="P5">Posição Solar <text:span text:style-name="T4">Norte</text:span><text:span text:style-name="T5"> - </text:span><text:span text:style-name="T1">Frente</text:span></text:p>
      <text:p text:style-name="P5">Gás central individual</text:p>
      <text:p text:style-name="P5">Esperas para Split</text:p>
      <text:p text:style-name="P5">Hidrômetro individual</text:p>
      <text:p text:style-name="P5"/>
      <text:p text:style-name="P5"/>
      <text:p text:style-name="P6">Condomínio: R$ <text:span text:style-name="T1">380</text:span>,00</text:p>
      <text:p text:style-name="P7"><text:span text:style-name="T3">IPTU 2026: </text:span>R$</text:p>
      <text:p text:style-name="P8"/>
      <text:p text:style-name="P9">Valor venda: R$ 430.000,00</text:p>
      <text:p text:style-name="P9"/>
      <text:h text:style-name="P10" text:outline-level="2">Descrição</text:h>
      <text:p text:style-name="P11">Apartamento em Camobi, Santa Maria (RS), com 3 dormitórios, sendo um deles Suíte com Sacada Exclusiva e vista para a rua. Possui living integrando sala de estar, jantar e cozinha em estilo americano. Ampla cozinha e área de serviço. - Duas Sacadas; - Churrasqueira; - Vaga de Garagem; - Semi-mobiliada; - Elevador. De: R$ 450.000,00 Por: R$ 430.000,00 Imóvel Financiável.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4T06:56:16.185380800</meta:creation-date>
    <dc:date>2026-05-25T19:42:40.995634000</dc:date>
    <meta:editing-duration>PT15M43S</meta:editing-duration>
    <meta:editing-cycles>8</meta:editing-cycles>
    <meta:generator>LibreOffice/26.2.3.2$Windows_X86_64 LibreOffice_project/70e089b17412e4cb7773e41413306b17a2328c34</meta:generator>
    <meta:document-statistic meta:table-count="0" meta:image-count="0" meta:object-count="0" meta:page-count="1" meta:paragraph-count="20" meta:word-count="139" meta:character-count="865" meta:non-whitespace-character-count="747"/>
  </office:meta>
</office:document-meta>
</file>