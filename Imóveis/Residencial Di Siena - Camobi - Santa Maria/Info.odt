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820000032447A0F2AE.png" manifest:media-type="image/png"/>
  <manifest:file-entry manifest:full-path="Pictures/100000010000038A00000246FF5070A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3a35" officeooo:paragraph-rsid="001d3a35" style:font-weight-asian="bold" style:font-weight-complex="bold"/>
    </style:style>
    <style:style style:name="P2" style:family="paragraph" style:parent-style-name="Standard">
      <style:text-properties fo:font-weight="bold" officeooo:rsid="001572a8" officeooo:paragraph-rsid="001572a8" style:font-weight-asian="bold" style:font-weight-complex="bold"/>
    </style:style>
    <style:style style:name="P3" style:family="paragraph" style:parent-style-name="Standard">
      <style:text-properties officeooo:rsid="001572a8" officeooo:paragraph-rsid="001572a8"/>
    </style:style>
    <style:style style:name="P4" style:family="paragraph" style:parent-style-name="Standard">
      <style:text-properties officeooo:paragraph-rsid="00165551"/>
    </style:style>
    <style:style style:name="P5" style:family="paragraph" style:parent-style-name="Standard">
      <style:text-properties officeooo:rsid="00159493" officeooo:paragraph-rsid="00159493"/>
    </style:style>
    <style:style style:name="P6" style:family="paragraph" style:parent-style-name="Standard">
      <style:text-properties officeooo:rsid="0015b35a" officeooo:paragraph-rsid="0015b35a"/>
    </style:style>
    <style:style style:name="P7" style:family="paragraph" style:parent-style-name="Standard">
      <style:text-properties officeooo:paragraph-rsid="0015b35a"/>
    </style:style>
    <style:style style:name="P8" style:family="paragraph" style:parent-style-name="Standard">
      <style:text-properties officeooo:rsid="001bde87" officeooo:paragraph-rsid="001bde87"/>
    </style:style>
    <style:style style:name="P9" style:family="paragraph" style:parent-style-name="Standard">
      <style:text-properties officeooo:rsid="0015b35a" officeooo:paragraph-rsid="00159493"/>
    </style:style>
    <style:style style:name="T1" style:family="text">
      <style:text-properties officeooo:rsid="001b7897"/>
    </style:style>
    <style:style style:name="T2" style:family="text">
      <style:text-properties fo:color="#000000" loext:opacity="100%" officeooo:rsid="00165551"/>
    </style:style>
    <style:style style:name="T3" style:family="text">
      <style:text-properties fo:font-variant="normal" fo:text-transform="none" fo:color="#000000" loext:opacity="100%" fo:font-family="Arial, sans-serif" fo:font-size="10.5pt" fo:letter-spacing="normal" fo:font-style="normal" fo:font-weight="normal"/>
    </style:style>
    <style:style style:name="T4" style:family="text">
      <style:text-properties fo:font-variant="normal" fo:text-transform="none" fo:color="#000000" loext:opacity="100%" fo:font-family="Arial, sans-serif" fo:font-size="10.5pt" fo:letter-spacing="normal" fo:font-style="normal" fo:font-weight="normal" officeooo:rsid="001e530b"/>
    </style:style>
    <style:style style:name="T5" style:family="text">
      <style:text-properties officeooo:rsid="0015b3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oridade: 4</text:p>
      <text:p text:style-name="P2"/>
      <text:p text:style-name="P2">Apartamento <text:span text:style-name="T1">Di Siena</text:span></text:p>
      <text:p text:style-name="P3">Residencial <text:span text:style-name="T1">Di Siena</text:span></text:p>
      <text:p text:style-name="P4"><text:span text:style-name="T2">Endereço: </text:span><text:span text:style-name="T3">RSC-287, 6250 - Camobi, Santa Maria </text:span><text:span text:style-name="T4">(</text:span><text:span text:style-name="T3">RS</text:span><text:span text:style-name="T4">)</text:span> </text:p>
      <text:p text:style-name="P5"><text:span text:style-name="T1">53</text:span> m² Área Privativa</text:p>
      <text:p text:style-name="P5"><text:span text:style-name="T1">70</text:span> m² Área total</text:p>
      <text:p text:style-name="P5">2 Dormitórios</text:p>
      <text:p text:style-name="P5"><text:span text:style-name="T1">1</text:span> Banheiros</text:p>
      <text:p text:style-name="P5">Cozinha integrada ao Living (Sala estar e jantar)</text:p>
      <text:p text:style-name="P5">Sacada com Churrasqueira</text:p>
      <text:p text:style-name="P5">Área de Serviço</text:p>
      <text:p text:style-name="P5">Vaga de Garagem</text:p>
      <text:p text:style-name="P5">Posição Solar </text:p>
      <text:p text:style-name="P5">Gás central individual</text:p>
      <text:p text:style-name="P5">Hidrômetro individual</text:p>
      <text:p text:style-name="P5"/>
      <text:p text:style-name="P6">Condomínio: R$ </text:p>
      <text:p text:style-name="P7"><text:span text:style-name="T5">IPTU 2026: </text:span>R$</text:p>
      <text:p text:style-name="P7"/>
      <text:p text:style-name="P8">Valor: 340.000,00</text:p>
      <text:p text:style-name="P5"/>
      <text:p text:style-name="P9"><draw:frame draw:style-name="fr1" draw:name="Image1" text:anchor-type="char" svg:x="0.106cm" svg:y="0.335cm" svg:width="17cm" svg:height="15.221cm" draw:z-index="0"><draw:image xlink:href="Pictures/10000001000003820000032447A0F2AE.png" xlink:type="simple" xlink:show="embed" xlink:actuate="onLoad" draw:mime-type="image/png"/></draw:frame><text:soft-page-break/></text:p>
      <text:p text:style-name="P9"/>
      <text:p text:style-name="P9"><draw:frame draw:style-name="fr1" draw:name="Image2" text:anchor-type="char" svg:x="0.079cm" svg:y="0.984cm" svg:width="17cm" svg:height="10.92cm" draw:z-index="1"><draw:image xlink:href="Pictures/100000010000038A00000246FF5070A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4T06:56:16.185380800</meta:creation-date>
    <dc:date>2026-05-25T19:43:03.676590100</dc:date>
    <meta:editing-duration>PT14M24S</meta:editing-duration>
    <meta:editing-cycles>8</meta:editing-cycles>
    <meta:generator>LibreOffice/26.2.3.2$Windows_X86_64 LibreOffice_project/70e089b17412e4cb7773e41413306b17a2328c34</meta:generator>
    <meta:document-statistic meta:table-count="0" meta:image-count="2" meta:object-count="0" meta:page-count="3" meta:paragraph-count="18" meta:word-count="61" meta:character-count="369" meta:non-whitespace-character-count="325"/>
  </office:meta>
</office:document-meta>
</file>