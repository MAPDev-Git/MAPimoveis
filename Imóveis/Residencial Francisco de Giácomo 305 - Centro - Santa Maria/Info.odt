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18bff2" officeooo:paragraph-rsid="0018bff2" style:font-weight-asian="bold" style:font-weight-complex="bold"/>
    </style:style>
    <style:style style:name="P2" style:family="paragraph" style:parent-style-name="Standard">
      <style:text-properties fo:font-weight="bold" officeooo:rsid="001572a8" officeooo:paragraph-rsid="001572a8" style:font-weight-asian="bold" style:font-weight-complex="bold"/>
    </style:style>
    <style:style style:name="P3" style:family="paragraph" style:parent-style-name="Standard">
      <style:text-properties officeooo:rsid="001572a8" officeooo:paragraph-rsid="001572a8"/>
    </style:style>
    <style:style style:name="P4" style:family="paragraph" style:parent-style-name="Standard">
      <style:text-properties officeooo:rsid="00165551" officeooo:paragraph-rsid="00165551"/>
    </style:style>
    <style:style style:name="P5" style:family="paragraph" style:parent-style-name="Standard">
      <style:text-properties officeooo:rsid="00159493" officeooo:paragraph-rsid="00159493"/>
    </style:style>
    <style:style style:name="P6" style:family="paragraph" style:parent-style-name="Standard">
      <style:text-properties officeooo:rsid="00159493" officeooo:paragraph-rsid="001669b2"/>
    </style:style>
    <style:style style:name="P7" style:family="paragraph" style:parent-style-name="Standard">
      <style:text-properties officeooo:rsid="0015b35a" officeooo:paragraph-rsid="0015b35a"/>
    </style:style>
    <style:style style:name="P8" style:family="paragraph" style:parent-style-name="Standard">
      <style:text-properties officeooo:paragraph-rsid="0015b35a"/>
    </style:style>
    <style:style style:name="P9" style:family="paragraph" style:parent-style-name="Standard">
      <style:text-properties officeooo:rsid="001669b2" officeooo:paragraph-rsid="001669b2"/>
    </style:style>
    <style:style style:name="P10" style:family="paragraph" style:parent-style-name="Standard">
      <style:text-properties officeooo:rsid="001bba41" officeooo:paragraph-rsid="001bba41"/>
    </style:style>
    <style:style style:name="P11" style:family="paragraph" style:parent-style-name="Standard">
      <style:text-properties fo:font-weight="bold" officeooo:rsid="00159493" officeooo:paragraph-rsid="00159493" style:font-weight-asian="bold" style:font-weight-complex="bold"/>
    </style:style>
    <style:style style:name="P12" style:family="paragraph" style:parent-style-name="Heading_20_2">
      <style:text-properties fo:font-variant="normal" fo:text-transform="none" fo:color="#000000" loext:opacity="100%" style:font-name="inherit" fo:font-size="9pt" fo:letter-spacing="normal" fo:font-style="normal" fo:font-weight="bold" officeooo:rsid="00159493" officeooo:paragraph-rsid="00159493" loext:padding="0cm" loext:border="none"/>
    </style:style>
    <style:style style:name="P13" style:family="paragraph" style:parent-style-name="Text_20_body">
      <style:paragraph-properties fo:margin-left="0cm" fo:margin-right="0cm" fo:margin-top="0.106cm" fo:margin-bottom="0.247cm" style:contextual-spacing="false" fo:line-height="133%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159493" officeooo:paragraph-rsid="001669b2" loext:padding="0cm" loext:border="none"/>
    </style:style>
    <style:style style:name="P14" style:family="paragraph" style:parent-style-name="Text_20_body">
      <style:paragraph-properties fo:margin-left="0cm" fo:margin-right="0cm" fo:margin-top="0.106cm" fo:margin-bottom="0.247cm" style:contextual-spacing="false" fo:line-height="133%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159493" officeooo:paragraph-rsid="0017a81a" loext:padding="0cm" loext:border="none"/>
    </style:style>
    <style:style style:name="P15" style:family="paragraph" style:parent-style-name="Standard">
      <style:text-properties fo:color="#000000" loext:opacity="100%" officeooo:rsid="00159493" officeooo:paragraph-rsid="00159493"/>
    </style:style>
    <style:style style:name="T1" style:family="text">
      <style:text-properties officeooo:rsid="001669b2"/>
    </style:style>
    <style:style style:name="T2" style:family="text">
      <style:text-properties officeooo:rsid="001a063c"/>
    </style:style>
    <style:style style:name="T3" style:family="text">
      <style:text-properties officeooo:rsid="0019d35a"/>
    </style:style>
    <style:style style:name="T4" style:family="text">
      <style:text-properties officeooo:rsid="0018781e"/>
    </style:style>
    <style:style style:name="T5" style:family="text">
      <style:text-properties officeooo:rsid="0017a81a"/>
    </style:style>
    <style:style style:name="T6" style:family="text">
      <style:text-properties officeooo:rsid="0017c847"/>
    </style:style>
    <style:style style:name="T7" style:family="text">
      <style:text-properties officeooo:rsid="0015b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oridade: 2</text:p>
      <text:p text:style-name="P2"/>
      <text:p text:style-name="P2">Apartamento <text:span text:style-name="T1">305</text:span></text:p>
      <text:p text:style-name="P3">Residencial <text:span text:style-name="T1">Francisco de Giácomo</text:span></text:p>
      <text:p text:style-name="P4">Endereço: Rua Venâncio Aires <text:span text:style-name="T1">920, </text:span><text:span text:style-name="T2">Bonfim</text:span><text:span text:style-name="T3"> – Santa Maria (RS)</text:span></text:p>
      <text:p text:style-name="P5"><text:span text:style-name="T1">113</text:span>,<text:span text:style-name="T1">76</text:span> m² Área Privativa</text:p>
      <text:p text:style-name="P5">1<text:span text:style-name="T1">49</text:span>,<text:span text:style-name="T1">64</text:span>, m² Área total</text:p>
      <text:p text:style-name="P5"><text:span text:style-name="T1">3</text:span> Dormitórios (1 Suíte, <text:span text:style-name="T1">1 dependência</text:span>)</text:p>
      <text:p text:style-name="P5"><text:span text:style-name="T1">3</text:span> Banheiros (1 Social e 1 na Suíte <text:span text:style-name="T1">e 1 na dependência</text:span>)</text:p>
      <text:p text:style-name="P6">Cozinha</text:p>
      <text:p text:style-name="P6">Living (Sala estar e jantar)</text:p>
      <text:p text:style-name="P5">Sacada</text:p>
      <text:p text:style-name="P5">Área de Serviço</text:p>
      <text:p text:style-name="P5">Vaga de Garagem <text:span text:style-name="T4">(Box 24)</text:span></text:p>
      <text:p text:style-name="P5">Posição Solar <text:span text:style-name="T5">Oeste - </text:span>Lateral/<text:span text:style-name="T5">Fundos</text:span></text:p>
      <text:p text:style-name="P5">Hidrômetro individual</text:p>
      <text:p text:style-name="P5"/>
      <text:p text:style-name="P7">Condomínio: R$ <text:span text:style-name="T6">490,00</text:span></text:p>
      <text:p text:style-name="P8"><text:span text:style-name="T7">IPTU 2026: </text:span>R$ <text:span text:style-name="T6">1.1</text:span><text:span text:style-name="T4">3</text:span><text:span text:style-name="T6">7,0</text:span><text:span text:style-name="T4">7</text:span></text:p>
      <text:p text:style-name="P5"/>
      <text:p text:style-name="P9">Valor: R$ 370.000,00</text:p>
      <text:p text:style-name="P9"/>
      <text:p text:style-name="P10">Imóvel financiável</text:p>
      <text:p text:style-name="P5"/>
      <text:p text:style-name="P11">Infraestrutura do Condomínio</text:p>
      <text:p text:style-name="P5"/>
      <text:p text:style-name="P5">Portão eletrônico <text:span text:style-name="T7">com vídeo monitoramento</text:span></text:p>
      <text:p text:style-name="P5">Recepção</text:p>
      <text:p text:style-name="P5">2 Elevadores (Social e Serviço)</text:p>
      <text:p text:style-name="P5">Salão de Festas</text:p>
      <text:p text:style-name="P5"/>
      <text:p text:style-name="P5"/>
      <text:h text:style-name="P12" text:outline-level="2">Descrição</text:h>
      <text:p text:style-name="P13">Apartamento no Centro de Santa Maria (RS), com 2 dormitórios (+ dependência completa) sendo um deles Suíte com Closet Exclusivo e sacada com vista aberta para as montanhas.</text:p>
      <text:p text:style-name="P13">Possui living integrando sala de estar e jantar com piso em tabuão de madeira nobre e janela com iluminação única para aproveitar o sol do final da tarde.</text:p>
      <text:p text:style-name="P13">Ampla cozinha e área de serviço. Quarto auxiliar com banheiro (dependência) que pode se tornar um office completo e aconchegante, isolado do restante da casa.</text:p>
      <text:p text:style-name="P13">Próximo ao Complexo de Atendimento Unimed Santa Maria e a toda a comodidade que a região central oferece.</text:p>
      <text:p text:style-name="P13"><text:s/>- Suíte com Closet + Dormitório + Quarto Auxiliar com banheiro (Dependência)</text:p>
      <text:p text:style-name="P13"><text:s/>- Vaga de Garagem fechada;</text:p>
      <text:p text:style-name="P13"><text:s/>- Sacada Exclusiva com vista aberta;</text:p>
      <text:p text:style-name="P14"><text:s/>- Possibilidade de instalação de churrasqueira.</text:p>
      <text:p text:style-name="P14"><text:soft-page-break/>De: R$ 450.000,00 Por: R$ 370.000,00 Imóvel Financiável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06:56:16.185380800</meta:creation-date>
    <dc:date>2026-05-25T21:38:04.792899700</dc:date>
    <meta:editing-duration>PT36M25S</meta:editing-duration>
    <meta:editing-cycles>9</meta:editing-cycles>
    <meta:generator>LibreOffice/26.2.3.2$Windows_X86_64 LibreOffice_project/70e089b17412e4cb7773e41413306b17a2328c34</meta:generator>
    <meta:document-statistic meta:table-count="0" meta:image-count="0" meta:object-count="0" meta:page-count="2" meta:paragraph-count="34" meta:word-count="233" meta:character-count="1440" meta:non-whitespace-character-count="1238"/>
  </office:meta>
</office:document-meta>
</file>