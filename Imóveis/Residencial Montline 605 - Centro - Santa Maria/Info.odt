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203f" officeooo:paragraph-rsid="001a203f" style:font-weight-asian="bold" style:font-weight-complex="bold"/>
    </style:style>
    <style:style style:name="P2" style:family="paragraph" style:parent-style-name="Standard">
      <style:text-properties fo:font-weight="bold" officeooo:rsid="001572a8" officeooo:paragraph-rsid="001572a8" style:font-weight-asian="bold" style:font-weight-complex="bold"/>
    </style:style>
    <style:style style:name="P3" style:family="paragraph" style:parent-style-name="Standard">
      <style:text-properties officeooo:rsid="001572a8" officeooo:paragraph-rsid="001572a8"/>
    </style:style>
    <style:style style:name="P4" style:family="paragraph" style:parent-style-name="Standard">
      <style:text-properties officeooo:rsid="00165551" officeooo:paragraph-rsid="00165551"/>
    </style:style>
    <style:style style:name="P5" style:family="paragraph" style:parent-style-name="Standard">
      <style:text-properties officeooo:rsid="00159493" officeooo:paragraph-rsid="00159493"/>
    </style:style>
    <style:style style:name="P6" style:family="paragraph" style:parent-style-name="Standard">
      <style:text-properties officeooo:rsid="0015b35a" officeooo:paragraph-rsid="0015b35a"/>
    </style:style>
    <style:style style:name="P7" style:family="paragraph" style:parent-style-name="Standard">
      <style:text-properties officeooo:paragraph-rsid="0015b35a"/>
    </style:style>
    <style:style style:name="P8" style:family="paragraph" style:parent-style-name="Standard">
      <style:text-properties officeooo:rsid="001bf62c" officeooo:paragraph-rsid="001bf62c"/>
    </style:style>
    <style:style style:name="P9" style:family="paragraph" style:parent-style-name="Standard">
      <style:text-properties fo:font-weight="bold" officeooo:rsid="00159493" officeooo:paragraph-rsid="00159493" style:font-weight-asian="bold" style:font-weight-complex="bold"/>
    </style:style>
    <style:style style:name="T1" style:family="text">
      <style:text-properties officeooo:rsid="0019be0e"/>
    </style:style>
    <style:style style:name="T2" style:family="text">
      <style:text-properties officeooo:rsid="001a6558"/>
    </style:style>
    <style:style style:name="T3" style:family="text">
      <style:text-properties officeooo:rsid="0015b35a"/>
    </style:style>
    <style:style style:name="T4" style:family="text">
      <style:text-properties officeooo:rsid="00181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oridade: 1</text:p>
      <text:p text:style-name="P2"/>
      <text:p text:style-name="P2">Apartamento 605</text:p>
      <text:p text:style-name="P3">Residencial Mont <text:span text:style-name="T1">L</text:span>ine</text:p>
      <text:p text:style-name="P4">Endereço: Rua Venâncio Aires 812, <text:span text:style-name="T2">Bonfim – Santa Maria (RS)</text:span></text:p>
      <text:p text:style-name="P5">94,<text:span text:style-name="T3">92</text:span> m² Área Privativa</text:p>
      <text:p text:style-name="P5">131,<text:span text:style-name="T3">13</text:span>, m² Área total</text:p>
      <text:p text:style-name="P5">2 Dormitórios (1 Suíte)</text:p>
      <text:p text:style-name="P5">2 Banheiros (1 Social e 1 na Suíte)</text:p>
      <text:p text:style-name="P5">Cozinha integrada ao Living (Sala estar e jantar)</text:p>
      <text:p text:style-name="P5">Sacada com Churrasqueira</text:p>
      <text:p text:style-name="P5">Área de Serviço</text:p>
      <text:p text:style-name="P5">Vaga de Garagem (Fechada)</text:p>
      <text:p text:style-name="P5">Posição Solar <text:span text:style-name="T4">Norte - </text:span>Lateral</text:p>
      <text:p text:style-name="P5">Gás central individual</text:p>
      <text:p text:style-name="P5">Esperas para Split</text:p>
      <text:p text:style-name="P5">Hidrômetro individual</text:p>
      <text:p text:style-name="P5">Aquecimento a Gás</text:p>
      <text:p text:style-name="P5">Porcelanato</text:p>
      <text:p text:style-name="P6">Condomínio: R$ 470,00</text:p>
      <text:p text:style-name="P7"><text:span text:style-name="T3">IPTU 2026: </text:span>R$ 761,50</text:p>
      <text:p text:style-name="P7"/>
      <text:p text:style-name="P8">Imóvel Financiável</text:p>
      <text:p text:style-name="P5"/>
      <text:p text:style-name="P5"/>
      <text:p text:style-name="P9">Infraestrutura do Condomínio</text:p>
      <text:p text:style-name="P5"/>
      <text:p text:style-name="P5">Piscina com Deck molhado</text:p>
      <text:p text:style-name="P5">Jardim com área verde</text:p>
      <text:p text:style-name="P5">Portão eletrônico com Segurança 24 horas <text:span text:style-name="T3">com vídeo monitoramento</text:span></text:p>
      <text:p text:style-name="P5">Recepção</text:p>
      <text:p text:style-name="P5">2 Elevadores (Social e Serviço)</text:p>
      <text:p text:style-name="P5">Espaço Gourmet com 40 Lugares (Salão de Festas)</text:p>
      <text:p text:style-name="P5">Lounge</text:p>
      <text:p text:style-name="P5">Varanda Gourmet</text:p>
      <text:p text:style-name="P5">Horta Coletiva</text:p>
      <text:p text:style-name="P5">Playground na área externa</text:p>
      <text:p text:style-name="P6">Quadra Poliesportiva</text:p>
      <text:p text:style-name="P5">Espaço Fitness</text:p>
      <text:p text:style-name="P5">Bicicletário</text:p>
      <text:p text:style-name="P5">Acessibilidade PCD</text:p>
      <text:p text:style-name="P5">Espaço Zen</text:p>
      <text:p text:style-name="P6">Gerador de energia</text:p>
      <text:p text:style-name="P6">Sistema de captação de água da chuv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06:56:16.185380800</meta:creation-date>
    <dc:date>2026-05-25T21:39:52.459991400</dc:date>
    <meta:editing-duration>PT11M15S</meta:editing-duration>
    <meta:editing-cycles>8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39" meta:word-count="144" meta:character-count="912" meta:non-whitespace-character-count="808"/>
  </office:meta>
</office:document-meta>
</file>