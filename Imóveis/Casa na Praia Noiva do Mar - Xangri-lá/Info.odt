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fo:font-weight="bold" officeooo:rsid="001e1596" officeooo:paragraph-rsid="001e1596" style:font-weight-asian="bold" style:font-weight-complex="bold"/>
    </style:style>
    <style:style style:name="P2" style:family="paragraph" style:parent-style-name="Standard">
      <style:text-properties fo:font-weight="bold" officeooo:rsid="001a2a6c" officeooo:paragraph-rsid="001a2a6c" style:font-weight-asian="bold" style:font-weight-complex="bold"/>
    </style:style>
    <style:style style:name="P3" style:family="paragraph" style:parent-style-name="Standard">
      <style:text-properties officeooo:rsid="001a2a6c" officeooo:paragraph-rsid="001a2a6c"/>
    </style:style>
    <style:style style:name="P4" style:family="paragraph" style:parent-style-name="Standard">
      <style:text-properties officeooo:rsid="00165551" officeooo:paragraph-rsid="00165551"/>
    </style:style>
    <style:style style:name="P5" style:family="paragraph" style:parent-style-name="Standard">
      <style:text-properties officeooo:rsid="00159493" officeooo:paragraph-rsid="00159493"/>
    </style:style>
    <style:style style:name="P6" style:family="paragraph" style:parent-style-name="Standard">
      <style:text-properties officeooo:rsid="001b9fa5" officeooo:paragraph-rsid="001b9fa5"/>
    </style:style>
    <style:style style:name="P7" style:family="paragraph" style:parent-style-name="Standard">
      <style:text-properties officeooo:rsid="0015b35a" officeooo:paragraph-rsid="0015b35a"/>
    </style:style>
    <style:style style:name="P8" style:family="paragraph" style:parent-style-name="Standard">
      <style:text-properties officeooo:paragraph-rsid="0015b35a"/>
    </style:style>
    <style:style style:name="P9" style:family="paragraph" style:parent-style-name="Standard">
      <style:text-properties officeooo:rsid="001d5314" officeooo:paragraph-rsid="001d5314"/>
    </style:style>
    <style:style style:name="P10" style:family="paragraph" style:parent-style-name="Heading_20_2">
      <style:text-properties fo:font-variant="normal" fo:text-transform="none" fo:color="#000000" loext:opacity="100%" style:font-name="inherit" fo:font-size="9pt" fo:letter-spacing="normal" fo:font-style="normal" fo:font-weight="bold" officeooo:rsid="001d5314" officeooo:paragraph-rsid="001d5314" loext:padding="0cm" loext:border="none"/>
    </style:style>
    <style:style style:name="P11" style:family="paragraph" style:parent-style-name="Text_20_body">
      <style:paragraph-properties fo:margin-left="0cm" fo:margin-right="0cm" fo:margin-top="0.106cm" fo:margin-bottom="0.247cm" style:contextual-spacing="false" fo:line-height="133%" fo:orphans="2" fo:widows="2" fo:text-indent="0cm" style:auto-text-indent="false"/>
      <style:text-properties fo:font-variant="normal" fo:text-transform="none" fo:color="#000000" loext:opacity="100%" style:font-name="inherit" fo:font-size="9pt" fo:letter-spacing="normal" fo:font-style="normal" fo:font-weight="normal" officeooo:rsid="001d5314" loext:padding="0cm" loext:border="none"/>
    </style:style>
    <style:style style:name="P12" style:family="paragraph" style:parent-style-name="Standard">
      <style:text-properties fo:color="#000000" loext:opacity="100%" officeooo:rsid="001d5314" officeooo:paragraph-rsid="001d5314"/>
    </style:style>
    <style:style style:name="T1" style:family="text">
      <style:text-properties officeooo:rsid="001a2a6c"/>
    </style:style>
    <style:style style:name="T2" style:family="text">
      <style:text-properties officeooo:rsid="001fdfbe"/>
    </style:style>
    <style:style style:name="T3" style:family="text">
      <style:text-properties officeooo:rsid="001d5314"/>
    </style:style>
    <style:style style:name="T4" style:family="text">
      <style:text-properties officeooo:rsid="001b9fa5"/>
    </style:style>
    <style:style style:name="T5" style:family="text">
      <style:text-properties officeooo:rsid="0015b3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ioridade: 5</text:p>
      <text:p text:style-name="P2"/>
      <text:p text:style-name="P2">Casa na Praia de Noiva do Mar – Xangri-lá (RS)</text:p>
      <text:p text:style-name="P3"/>
      <text:p text:style-name="P4">Endereço: Rua <text:span text:style-name="T1">das Estremosas, 375 – </text:span><text:span text:style-name="T2">Xangri-Lá (RS)</text:span></text:p>
      <text:p text:style-name="P5"><text:span text:style-name="T3">187</text:span><text:span text:style-name="T1"> </text:span>m² Área Privativa</text:p>
      <text:p text:style-name="P5"><text:span text:style-name="T4">300</text:span>, m² Área total <text:span text:style-name="T4">(12x25)</text:span></text:p>
      <text:p text:style-name="P5"><text:span text:style-name="T4">3</text:span> Dormitórios (1 Suíte)</text:p>
      <text:p text:style-name="P5"><text:span text:style-name="T4">3</text:span> Banheiros (1 Social e 1 na Suíte <text:span text:style-name="T4">e 1 externo</text:span>)</text:p>
      <text:p text:style-name="P5">Cozinha integrada ao Living (Sala estar e jantar)</text:p>
      <text:p text:style-name="P5">Sacada</text:p>
      <text:p text:style-name="P6">Churrasqueira interna e externa</text:p>
      <text:p text:style-name="P5">Área de Serviço</text:p>
      <text:p text:style-name="P6">Storage</text:p>
      <text:p text:style-name="P5">Vaga de Garagem (Fechada)</text:p>
      <text:p text:style-name="P5">Posição Solar <text:span text:style-name="T4">Frente Leste</text:span></text:p>
      <text:p text:style-name="P7"/>
      <text:p text:style-name="P8"><text:span text:style-name="T5">IPTU: </text:span>R$ <text:span text:style-name="T3">1900</text:span>,<text:span text:style-name="T3">00</text:span></text:p>
      <text:p text:style-name="P5"/>
      <text:p text:style-name="P9">Valor para venda: R$ 730.000,00</text:p>
      <text:p text:style-name="P9"/>
      <text:h text:style-name="P10" text:outline-level="2">Descrição</text:h>
      <text:p text:style-name="P11">Casa Mobiliada, estilo Rústico com 3 Dormitórios, sendo 1 Suíte, Praia de Noiva do Mar, Xangri-Lá (RS). Aconchegante e ao mesmo tempo funcional. Essa casa é ideal para quem quer acomodar bem família e amigos, ficando apenas a 300 metros do mar e de todo o sossego da preia de Noiva do Mar. Amplo Living integrando Sala de Estar, Jantar e Cozinha. Ótima localização, pertinho da praia, próxima do Mercado Asun Noiva do Mar, Padaria Vanellis e Farmácia Panvel. - Sacada Com Visão para o Mar; - Garagem Fechada; - Churrasqueira interna e externa; - Lareira - Varanda Frontal; - Frente Leste; - Área de Serviço com acesso ao Pátio: - Quiosque nos Fundos; - Mobiliada; - Financiável. De: R$ 750.000,00 Por: R$ 730.000,00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4T06:56:16.185380800</meta:creation-date>
    <dc:date>2026-05-25T19:41:42.043860600</dc:date>
    <meta:editing-duration>PT12M5S</meta:editing-duration>
    <meta:editing-cycles>7</meta:editing-cycles>
    <meta:generator>LibreOffice/26.2.3.2$Windows_X86_64 LibreOffice_project/70e089b17412e4cb7773e41413306b17a2328c34</meta:generator>
    <meta:document-statistic meta:table-count="0" meta:image-count="0" meta:object-count="0" meta:page-count="1" meta:paragraph-count="18" meta:word-count="202" meta:character-count="1156" meta:non-whitespace-character-count="972"/>
  </office:meta>
</office:document-meta>
</file>